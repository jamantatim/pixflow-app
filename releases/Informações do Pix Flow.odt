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f67" officeooo:paragraph-rsid="00070f67"/>
    </style:style>
    <style:style style:name="P2" style:family="paragraph" style:parent-style-name="Standard">
      <style:text-properties officeooo:rsid="00070f67" officeooo:paragraph-rsid="000a9cba"/>
    </style:style>
    <style:style style:name="P3" style:family="paragraph" style:parent-style-name="Standard">
      <style:text-properties officeooo:rsid="0008f3e9" officeooo:paragraph-rsid="0008f3e9"/>
    </style:style>
    <style:style style:name="P4" style:family="paragraph" style:parent-style-name="Standard">
      <style:paragraph-properties fo:text-align="center" style:justify-single-word="false"/>
      <style:text-properties officeooo:rsid="000a9cba" officeooo:paragraph-rsid="000a9cba"/>
    </style:style>
    <style:style style:name="P5" style:family="paragraph" style:parent-style-name="Standard">
      <style:paragraph-properties fo:text-align="start" style:justify-single-word="false"/>
      <style:text-properties officeooo:rsid="000a9cba" officeooo:paragraph-rsid="000a9c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DO APP FIXFLOW</text:p>
      <text:p text:style-name="P1"/>
      <text:p text:style-name="P1"/>
      <text:p text:style-name="P1"><text:a xlink:type="simple" xlink:href="https://drive.google.com/file/d/1a1yp5n6WmknxGularCyUd3DNb9K56M5h/view?usp=sharing" text:style-name="Internet_20_link" text:visited-style-name="Visited_20_Internet_20_Link">https://drive.google.com/file/d/1a1yp5n6WmknxGularCyUd3DNb9K56M5h/view?usp=sharing</text:a></text:p>
      <text:p text:style-name="P1"/>
      <text:p text:style-name="P1"><text:a xlink:type="simple" xlink:href="https://shre.ink/3sFW" text:style-name="Internet_20_link" text:visited-style-name="Visited_20_Internet_20_Link">https://shre.ink/3sFW</text:a></text:p>
      <text:p text:style-name="P1"/>
      <text:p text:style-name="P1"/>
      <text:p text:style-name="P1">🚀 CHEGOU O PIXFLOW! O Gerador de QR Code PIX mais rápido do Brasil! 💚</text:p>
      <text:p text:style-name="P1"/>
      <text:p text:style-name="P1">Cansado de depender do app do banco para cobrar seus clientes? </text:p>
      <text:p text:style-name="P1">Com o PixFlow você gera QR Codes em segundos, direto do seu celular! ⚡</text:p>
      <text:p text:style-name="P1"/>
      <text:p text:style-name="P1">✅ Super leve e rápido</text:p>
      <text:p text:style-name="P1">✅ Interface simples e intuitiva</text:p>
      <text:p text:style-name="P1">✅ Ideal para comerciantes, freelancers e prestadores de serviço</text:p>
      <text:p text:style-name="P1">✅ Funciona offline</text:p>
      <text:p text:style-name="P1">✅ Disponível para Android e Linux</text:p>
      <text:p text:style-name="P1"/>
      <text:p text:style-name="P1">🔓 VERSÃO FREE: Teste grátis agora mesmo!</text:p>
      <text:p text:style-name="P1">⭐ VERSÃO PREMIUM: QR Codes ilimitados por apenas R$ 29,90 (pagamento único!)</text:p>
      <text:p text:style-name="P1"/>
      <text:p text:style-name="P1">📥 BAIXE AGORA:</text:p>
      <text:p text:style-name="P2"><text:a xlink:type="simple" xlink:href="https://shre.ink/3sFW" text:style-name="Internet_20_link" text:visited-style-name="Visited_20_Internet_20_Link">https://shre.ink/3sFW</text:a></text:p>
      <text:p text:style-name="P1"/>
      <text:p text:style-name="P1">💬 Compartilhe com aquele amigo que precisa agilizar as vendas!</text:p>
      <text:p text:style-name="P1"/>
      <text:p text:style-name="P1">#PixFlow #Pix #Android #Vendas #Empreendedorismo #Comerciante #Freelancer #Tecnologia #Brasil</text:p>
      <text:p text:style-name="P3">#Chave Pix Celular tem que começar com <text:s/>(+55DDD99999999) <text:s/></text:p>
      <text:p text:style-name="P3"/>
      <text:p text:style-name="P3"/>
      <text:p text:style-name="P4">Comando para gerar Posts</text:p>
      <text:p text:style-name="P4"/>
      <text:p text:style-name="P5"/>
      <text:p text:style-name="P5">bash</text:p>
      <text:p text:style-name="P5"/>
      <text:p text:style-name="P5">nano ~/pixflow_app/gerador_posts.py</text:p>
      <text:p text:style-name="P5"/>
      <text:p text:style-name="P5">colar o código</text:p>
      <text:p text:style-name="P5"/>
      <text:p text:style-name="P5">#!/usr/bin/env python3</text:p>
      <text:p text:style-name="P5"># -*- coding: utf-8 -*-</text:p>
      <text:p text:style-name="P5"/>
      <text:p text:style-name="P5">LINK = "https://drive.google.com/file/d/1a1yp5n6WmknxGularCyUd3DNb9K56M5h/view?usp=drive_link"</text:p>
      <text:p text:style-name="P5"/>
      <text:p text:style-name="P5">posts = [</text:p>
      <text:p text:style-name="P5"><text:s text:c="4"/>["Segunda 11:00", "Lancamento", """🚀 CHEGOU O PIXFLOW!</text:p>
      <text:p text:style-name="P5">O Gerador de QR Code PIX mais rapido do Brasil! 💚</text:p>
      <text:p text:style-name="P5"/>
      <text:p text:style-name="P5">✅ Super leve e rapido</text:p>
      <text:p text:style-name="P5"><text:soft-page-break/>✅ Interface simples e intuitiva</text:p>
      <text:p text:style-name="P5">✅ Ideal para comerciantes e freelancers</text:p>
      <text:p text:style-name="P5">✅ Disponivel para Android e Linux</text:p>
      <text:p text:style-name="P5"/>
      <text:p text:style-name="P5">🔓 VERSAO FREE: Teste gratis!</text:p>
      <text:p text:style-name="P5">⭐ VERSAO PREMIUM: R$ 29,90 (pagamento unico!)</text:p>
      <text:p text:style-name="P5"/>
      <text:p text:style-name="P5">📥 BAIXE AGORA:</text:p>
      <text:p text:style-name="P5">""" + LINK + """</text:p>
      <text:p text:style-name="P5"/>
      <text:p text:style-name="P5">#PixFlow #Pix #Android #Vendas #Empreendedorismo"""],</text:p>
      <text:p text:style-name="P5"/>
      <text:p text:style-name="P5"><text:s text:c="4"/>["Terca 15:00", "Freelancers", """💡 DICA PARA FREELANCERS!</text:p>
      <text:p text:style-name="P5"/>
      <text:p text:style-name="P5">Agilize suas cobrancas em segundos! ⚡</text:p>
      <text:p text:style-name="P5"/>
      <text:p text:style-name="P5">Com o PixFlow voce:</text:p>
      <text:p text:style-name="P5">✅ Gera QR Code PIX instantaneo</text:p>
      <text:p text:style-name="P5">✅ Cobra sem depender do app do banco</text:p>
      <text:p text:style-name="P5">✅ Trabalha de forma mais profissional</text:p>
      <text:p text:style-name="P5"/>
      <text:p text:style-name="P5">🔓 Teste gratis: """ + LINK + """</text:p>
      <text:p text:style-name="P5"/>
      <text:p text:style-name="P5">#Freelancer #PixFlow #Produtividade #Vendas"""],</text:p>
      <text:p text:style-name="P5"/>
      <text:p text:style-name="P5"><text:s text:c="4"/>["Quarta 19:00", "Comerciantes", """🎯 ATENCAO COMERCIANTES!</text:p>
      <text:p text:style-name="P5"/>
      <text:p text:style-name="P5">Feirantes, vendedores, prestadores de servico...</text:p>
      <text:p text:style-name="P5">O PixFlow foi feito para VOCE! 💚</text:p>
      <text:p text:style-name="P5"/>
      <text:p text:style-name="P5">✅ Cobre clientes em segundos</text:p>
      <text:p text:style-name="P5">✅ Sem complicacao de app bancario</text:p>
      <text:p text:style-name="P5">✅ Interface simples e direta</text:p>
      <text:p text:style-name="P5"/>
      <text:p text:style-name="P5">📥 Baixe gratis: """ + LINK + """</text:p>
      <text:p text:style-name="P5"/>
      <text:p text:style-name="P5">#Comerciante #PixFlow #Vendas #PequenosNegocios"""],</text:p>
      <text:p text:style-name="P5"/>
      <text:p text:style-name="P5"><text:s text:c="4"/>["Quinta 12:00", "Premium", """⭐ CONHECA A VERSAO PREMIUM DO PIXFLOW!</text:p>
      <text:p text:style-name="P5"/>
      <text:p text:style-name="P5">Por apenas R$ 29,90 (pagamento unico):</text:p>
      <text:p text:style-name="P5"/>
      <text:p text:style-name="P5">✅ QR Codes ILIMITADOS</text:p>
      <text:p text:style-name="P5">✅ Sem secao de doacao</text:p>
      <text:p text:style-name="P5">✅ Uso comercial profissional</text:p>
      <text:p text:style-name="P5">✅ Licenca vitalicia</text:p>
      <text:p text:style-name="P5"/>
      <text:p text:style-name="P5">📥 Teste a versao Free: """ + LINK + """</text:p>
      <text:p text:style-name="P5"/>
      <text:p text:style-name="P5">#PixFlowPremium #Vendas #Empreendedorismo"""],</text:p>
      <text:p text:style-name="P5"/>
      <text:p text:style-name="P5"><text:s text:c="4"/>["Sexta 17:00", "Sextou", """🎉 SEXTOU COM PIXFLOW!</text:p>
      <text:p text:style-name="P5"><text:soft-page-break/></text:p>
      <text:p text:style-name="P5">Fim de semana e epoca de vendas! 💰</text:p>
      <text:p text:style-name="P5">Garanta que voce esta pronto para cobrar rapido!</text:p>
      <text:p text:style-name="P5"/>
      <text:p text:style-name="P5">✅ Gere QR Codes em segundos</text:p>
      <text:p text:style-name="P5">✅ Interface simples e rapida</text:p>
      <text:p text:style-name="P5">✅ Android e Linux</text:p>
      <text:p text:style-name="P5"/>
      <text:p text:style-name="P5">🔓 Versao Free: """ + LINK + """</text:p>
      <text:p text:style-name="P5"/>
      <text:p text:style-name="P5">#Sextou #PixFlow #Vendas #FimDeSemana"""],</text:p>
      <text:p text:style-name="P5"/>
      <text:p text:style-name="P5"><text:s text:c="4"/>["Sabado 10:00", "Android", """📱 PIXFLOW NO SEU ANDROID!</text:p>
      <text:p text:style-name="P5"/>
      <text:p text:style-name="P5">Leve seu gerador de QR Code PIX para qualquer lugar! ⚡</text:p>
      <text:p text:style-name="P5"/>
      <text:p text:style-name="P5">✅ App leve (apenas 20MB)</text:p>
      <text:p text:style-name="P5">✅ Interface otimizada para mobile</text:p>
      <text:p text:style-name="P5">✅ Geracao instantanea de QR Codes</text:p>
      <text:p text:style-name="P5"/>
      <text:p text:style-name="P5">📥 Baixe o APK gratis: """ + LINK + """</text:p>
      <text:p text:style-name="P5"/>
      <text:p text:style-name="P5">#Android #PixFlow #Mobile #Pix #App"""],</text:p>
      <text:p text:style-name="P5"/>
      <text:p text:style-name="P5"><text:s text:c="4"/>["Domingo 14:00", "Linux", """🐧 USUARIOS LINUX, ESSE E PARA VOCES!</text:p>
      <text:p text:style-name="P5"/>
      <text:p text:style-name="P5">PixFlow tambem esta disponivel para Linux! 💚</text:p>
      <text:p text:style-name="P5"/>
      <text:p text:style-name="P5">✅ Ubuntu, Debian, Fedora, Zorin OS e mais</text:p>
      <text:p text:style-name="P5">✅ Executavel portatil (sem instalacao)</text:p>
      <text:p text:style-name="P5">✅ Interface moderna e responsiva</text:p>
      <text:p text:style-name="P5"/>
      <text:p text:style-name="P5">📥 Baixe o ZIP: """ + LINK + """</text:p>
      <text:p text:style-name="P5"/>
      <text:p text:style-name="P5">#Linux #PixFlow #Tecnologia #Desktop"""],</text:p>
      <text:p text:style-name="P5">]</text:p>
      <text:p text:style-name="P5"/>
      <text:p text:style-name="P5">print("=" * 50)</text:p>
      <text:p text:style-name="P5">print(" <text:s/>CALENDARIO DE POSTAGENS - PIXFLOW")</text:p>
      <text:p text:style-name="P5">print("=" * 50)</text:p>
      <text:p text:style-name="P5"/>
      <text:p text:style-name="P5">arquivo = open("calendario_posts.txt", "w")</text:p>
      <text:p text:style-name="P5"/>
      <text:p text:style-name="P5">for i in range(30):</text:p>
      <text:p text:style-name="P5"><text:s text:c="4"/>post = posts[i % 7]</text:p>
      <text:p text:style-name="P5"><text:s text:c="4"/>dia = i + 1</text:p>
      <text:p text:style-name="P5"><text:s text:c="4"/></text:p>
      <text:p text:style-name="P5"><text:s text:c="4"/>texto = f"""</text:p>
      <text:p text:style-name="P5">{'='*50}</text:p>
      <text:p text:style-name="P5">POST {dia}</text:p>
      <text:p text:style-name="P5">Quando: {post[0]}</text:p>
      <text:p text:style-name="P5">Tema: {post[1]}</text:p>
      <text:p text:style-name="P5"><text:soft-page-break/>{'='*50}</text:p>
      <text:p text:style-name="P5"/>
      <text:p text:style-name="P5">{post[2]}</text:p>
      <text:p text:style-name="P5"/>
      <text:p text:style-name="P5">"""</text:p>
      <text:p text:style-name="P5"><text:s text:c="4"/>print(f"✅ Post {dia} gerado: {post[1]}")</text:p>
      <text:p text:style-name="P5"><text:s text:c="4"/>arquivo.write(texto)</text:p>
      <text:p text:style-name="P5"/>
      <text:p text:style-name="P5">arquivo.close()</text:p>
      <text:p text:style-name="P5">print("\n🎉 PRONTO! Arquivo 'calendario_posts.txt' criado!")</text:p>
      <text:p text:style-name="P5">print("📂 Ele esta na pasta: ~/pixflow_app/")</text:p>
      <text:p text:style-name="P5">print("\n📋 Agora abra esse arquivo, copie cada post")</text:p>
      <text:p text:style-name="P5">print(" <text:s text:c="2"/>e cole no Meta Business Suite!")</text:p>
      <text:p text:style-name="P5"/>
      <text:p text:style-name="P5"/>
      <text:p text:style-name="P5">salvar sair</text:p>
      <text:p text:style-name="P5"/>
      <text:p text:style-name="P5"/>
      <text:p text:style-name="P5">Comando para executar o script</text:p>
      <text:p text:style-name="P5"/>
      <text:p text:style-name="P5">cd ~/pixflow_app &amp;&amp; python3 gerador_posts.py</text:p>
      <text:p text:style-name="P5"/>
      <text:p text:style-name="P5"/>
      <text:p text:style-name="P5">Comando para abrir o arquivo de texto</text:p>
      <text:p text:style-name="P5"/>
      <text:p text:style-name="P5">xdg-open ~/pixflow_app/calendario_posts.txt</text:p>
      <text:p text:style-name="P5"/>
      <text:p text:style-name="P5">Comando para gerar hashtags do calendário</text:p>
      <text:p text:style-name="P5"/>
      <text:p text:style-name="P5">cd ~/pixflow_app &amp;&amp; python3 gerador_posts.py &amp;&amp; xdg-open calendario_posts.t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09:53:56.107261920</meta:creation-date>
    <dc:date>2026-06-19T07:18:34.412252708</dc:date>
    <meta:editing-duration>P3DT12H56M19S</meta:editing-duration>
    <meta:editing-cycles>3</meta:editing-cycles>
    <meta:generator>LibreOffice/7.5.5.2$Linux_X86_64 LibreOffice_project/50$Build-2</meta:generator>
    <meta:document-statistic meta:table-count="0" meta:image-count="0" meta:object-count="0" meta:page-count="4" meta:paragraph-count="114" meta:word-count="612" meta:character-count="4057" meta:non-whitespace-character-count="3499"/>
  </office:meta>
</office:document-meta>
</file>